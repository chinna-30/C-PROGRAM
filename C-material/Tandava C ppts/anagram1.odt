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ea7b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Text_20_body">
      <style:text-properties fo:color="#1c3687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Text_20_body">
      <style:text-properties fo:color="#680059" fo:font-size="14pt" officeooo:rsid="0015d954" officeooo:paragraph-rsid="0015d954" style:font-size-asian="14pt" style:font-size-complex="14pt"/>
    </style:style>
    <style:style style:name="P5" style:family="paragraph" style:parent-style-name="Text_20_body">
      <style:text-properties fo:color="#680059" fo:font-size="14pt" officeooo:rsid="00162f8f" officeooo:paragraph-rsid="0017ea7b" style:font-size-asian="14pt" style:font-size-complex="14pt"/>
    </style:style>
    <style:style style:name="P6" style:family="paragraph" style:parent-style-name="Text_20_body">
      <style:text-properties fo:color="#680059" fo:font-size="14pt" officeooo:rsid="00162f8f" officeooo:paragraph-rsid="00162f8f" style:font-size-asian="14pt" style:font-size-complex="14pt"/>
    </style:style>
    <style:style style:name="P7" style:family="paragraph" style:parent-style-name="Text_20_body">
      <style:text-properties fo:color="#000000" fo:font-size="14pt" officeooo:rsid="00162f8f" officeooo:paragraph-rsid="00162f8f" style:font-size-asian="14pt" style:font-size-complex="14pt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text-properties fo:font-size="14pt" officeooo:rsid="0017ea7b" officeooo:paragraph-rsid="0017ea7b" style:font-size-asian="14pt" style:font-size-complex="14pt"/>
    </style:style>
    <style:style style:name="P10" style:family="paragraph" style:parent-style-name="Text_20_body">
      <style:text-properties fo:font-size="14pt" officeooo:rsid="0015d954" officeooo:paragraph-rsid="0017ea7b" style:font-size-asian="14pt" style:font-size-complex="14pt"/>
    </style:style>
    <style:style style:name="P11" style:family="paragraph" style:parent-style-name="Text_20_body">
      <style:text-properties fo:font-size="14pt" officeooo:rsid="0015d954" officeooo:paragraph-rsid="0015d954" style:font-size-asian="14pt" style:font-size-complex="14pt"/>
    </style:style>
    <style:style style:name="P12" style:family="paragraph" style:parent-style-name="Text_20_body">
      <style:text-properties fo:font-size="14pt" officeooo:rsid="00162f8f" officeooo:paragraph-rsid="001b8d63" style:font-size-asian="14pt" style:font-size-complex="14pt"/>
    </style:style>
    <style:style style:name="P13" style:family="paragraph" style:parent-style-name="Text_20_body">
      <style:text-properties fo:font-size="14pt" officeooo:rsid="00162f8f" officeooo:paragraph-rsid="001ab824" style:font-size-asian="14pt" style:font-size-complex="14pt"/>
    </style:style>
    <style:style style:name="P14" style:family="paragraph" style:parent-style-name="Text_20_body">
      <style:text-properties fo:font-size="14pt" officeooo:rsid="00162f8f" officeooo:paragraph-rsid="00162f8f" style:font-size-asian="14pt" style:font-size-complex="14pt"/>
    </style:style>
    <style:style style:name="P15" style:family="paragraph" style:parent-style-name="Text_20_body">
      <style:text-properties fo:font-size="14pt" style:font-name-asian="Liberation Serif1" style:font-size-asian="14pt" style:font-name-complex="Liberation Serif1" style:font-size-complex="14pt"/>
    </style:style>
    <style:style style:name="P16" style:family="paragraph" style:parent-style-name="Text_20_body" style:master-page-name="Standard">
      <style:paragraph-properties style:page-number="auto"/>
      <style:text-properties fo:font-size="20pt" fo:font-weight="bold" officeooo:paragraph-rsid="0017ea7b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5d954" style:font-size-asian="15pt" style:font-size-complex="15pt"/>
    </style:style>
    <style:style style:name="T3" style:family="text">
      <style:text-properties fo:font-size="15pt" officeooo:rsid="0017ea7b" style:font-size-asian="15pt" style:font-size-complex="15pt"/>
    </style:style>
    <style:style style:name="T4" style:family="text">
      <style:text-properties fo:color="#ef413d"/>
    </style:style>
    <style:style style:name="T5" style:family="text">
      <style:text-properties fo:color="#ef413d" officeooo:rsid="00162f8f"/>
    </style:style>
    <style:style style:name="T6" style:family="text">
      <style:text-properties fo:color="#ef413d" officeooo:rsid="0017ea7b"/>
    </style:style>
    <style:style style:name="T7" style:family="text">
      <style:text-properties officeooo:rsid="00162f8f"/>
    </style:style>
    <style:style style:name="T8" style:family="text">
      <style:text-properties fo:color="#680059"/>
    </style:style>
    <style:style style:name="T9" style:family="text">
      <style:text-properties fo:color="#00381f"/>
    </style:style>
    <style:style style:name="T10" style:family="text">
      <style:text-properties fo:color="#ed1c24" fo:font-size="15pt" style:text-underline-style="none" fo:font-weight="bold" officeooo:rsid="0017810c" style:font-size-asian="15pt" style:font-weight-asian="bold" style:font-size-complex="15pt" style:font-weight-complex="bold"/>
    </style:style>
    <style:style style:name="T11" style:family="text">
      <style:text-properties fo:color="#ed1c24" fo:font-size="26pt" style:text-underline-style="solid" style:text-underline-width="auto" style:text-underline-color="font-color" fo:font-weight="bold" officeooo:rsid="0017810c" style:font-size-asian="26pt" style:font-weight-asian="bold" style:font-size-complex="26pt" style:font-weight-complex="bold"/>
    </style:style>
    <style:style style:name="T12" style:family="text">
      <style:text-properties fo:color="#ed1c24" style:text-underline-style="none" fo:font-weight="bold" officeooo:rsid="0017810c" style:font-weight-asian="bold" style:font-weight-complex="bold"/>
    </style:style>
    <style:style style:name="T13" style:family="text">
      <style:text-properties fo:color="#ed1c24" style:text-underline-style="none" officeooo:rsid="0017810c"/>
    </style:style>
    <style:style style:name="T14" style:family="text">
      <style:text-properties fo:color="#ed1c24" style:text-underline-style="solid" style:text-underline-width="auto" style:text-underline-color="font-color" fo:font-weight="bold" officeooo:rsid="0017810c" style:font-weight-asian="bold" style:font-weight-complex="bold"/>
    </style:style>
    <style:style style:name="T15" style:family="text">
      <style:text-properties fo:color="#ed1c24" style:text-underline-style="solid" style:text-underline-width="auto" style:text-underline-color="font-color" officeooo:rsid="0017810c"/>
    </style:style>
    <style:style style:name="T16" style:family="text">
      <style:text-properties officeooo:rsid="0017ea7b"/>
    </style:style>
    <style:style style:name="T17" style:family="text">
      <style:text-properties fo:color="#000000"/>
    </style:style>
    <style:style style:name="T18" style:family="text">
      <style:text-properties fo:color="#000000" officeooo:rsid="0017ea7b"/>
    </style:style>
    <style:style style:name="T19" style:family="text">
      <style:text-properties officeooo:rsid="001a8d9b"/>
    </style:style>
    <style:style style:name="T20" style:family="text">
      <style:text-properties officeooo:rsid="001ab824"/>
    </style:style>
    <style:style style:name="T21" style:family="text">
      <style:text-properties officeooo:rsid="0015d954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3"><text:s text:c="36"/></text:span><text:span text:style-name="T15">Anagram</text:span></text:p>
      <text:p text:style-name="P1"><text:span text:style-name="T23">An </text:span><text:span text:style-name="Strong_20_Emphasis"><text:span text:style-name="T23">anagram</text:span></text:span><text:span text:style-name="T23"> refers to a concept where you check if two strings contain the same characters in the same frequency but possibly in a different order.</text:span></text:p>
      <text:p text:style-name="P8">To check if two strings are anagrams in C, <text:span text:style-name="T21">follow the below steps,</text:span></text:p>
      <text:p text:style-name="P8">i)Remove all non_alphabets from two strings.</text:p>
      <text:p text:style-name="P9">ii)Find the length of the strings.</text:p>
      <text:p text:style-name="P10"><text:span text:style-name="T16">(I</text:span>f length of the two strings are equal,then follow the remaining steps.</text:p>
      <text:p text:style-name="P12"><text:span text:style-name="T20">If length of the strings are not equal,then strings are not in anagram format.</text:span>)</text:p>
      <text:p text:style-name="P8">i<text:span text:style-name="T16">ii</text:span>)Convert both strings to any one case.(upper case/lowercase)</text:p>
      <text:p text:style-name="P8"><text:span text:style-name="T16">iv</text:span>)Sort the strings either ascending or de<text:span text:style-name="T16">s</text:span>cending .</text:p>
      <text:p text:style-name="P8"><text:span text:style-name="T16">v</text:span>)Finally compare two strings using strcmp .If the strings are equal means, strings are in anagram format ,otherwise the strings are not in anagram format.</text:p>
      <text:p text:style-name="P3">Example:</text:p>
      <text:p text:style-name="P11">String 1: “12#&amp;il <text:s/>@Ste <text:s/>0$ N4”.</text:p>
      <text:p text:style-name="P11">String 2: <text:s/>“LS^90 <text:s/>!eni*t”.</text:p>
      <text:p text:style-name="P11"><text:span text:style-name="T4">step 1</text:span>: After removing all non-alphabets from two strings,</text:p>
      <text:p text:style-name="P11"><text:s text:c="8"/><text:span text:style-name="T8"><text:s text:c="3"/>String1: “ilSteN”.</text:span></text:p>
      <text:p text:style-name="P4"><text:s text:c="11"/>String2: “LSenit”.</text:p>
      <text:p text:style-name="P11"><text:span text:style-name="T5">Step 2</text:span><text:span text:style-name="T7">: </text:span>Find the length of two strings.</text:p>
      <text:p text:style-name="P13">(If length of the strings are equal, then follow the remaining steps.</text:p>
      <text:p text:style-name="P13"><text:span text:style-name="T20">If length of the strings are not equal,then strings are not in anagram format.</text:span>)</text:p>
      <text:p text:style-name="P14"><text:span text:style-name="T4">Step 3</text:span>: Convert the characters to any one case.</text:p>
      <text:p text:style-name="P14"><text:s text:c="8"/><text:span text:style-name="T8"><text:s text:c="2"/>String 1: “ILSTEN”.</text:span></text:p>
      <text:p text:style-name="P5"><text:s text:c="10"/>String 2: “LSENIT”.</text:p>
      <text:p text:style-name="P5"><text:span text:style-name="T4">Step </text:span><text:span text:style-name="T6">4</text:span><text:span text:style-name="T17">: Sort the strings either ascending or de</text:span><text:span text:style-name="T18">s</text:span><text:span text:style-name="T17">cending format.</text:span></text:p>
      <text:p text:style-name="P7"><text:s text:c="9"/><text:span text:style-name="T8"><text:s text:c="2"/>String 1: “EILNST”.</text:span></text:p>
      <text:p text:style-name="P6"><text:s text:c="11"/>String 2: “E<text:span text:style-name="T16">I</text:span>LNST”.</text:p>
      <text:p text:style-name="P7"><text:span text:style-name="T4">Step </text:span><text:span text:style-name="T6">5</text:span>:Compare the strings using strcmp.If two strings are equal then the <text:span text:style-name="T16">given </text:span>strings are in<text:span text:style-name="T9"> ANAGRAM</text:span> format ,otherwise strings are not in anagram format.</text:p>
      <text:p text:style-name="P6"><text:soft-page-break/></text:p>
      <text:p text:style-name="P8"/>
      <text:p text:style-name="P8"/>
      <text:p text:style-name="P15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8T15:04:18.305688462</meta:creation-date>
    <dc:date>2025-04-08T16:22:42.398756977</dc:date>
    <meta:editing-cycles>6</meta:editing-cycles>
    <meta:editing-duration>PT27M51S</meta:editing-duration>
    <meta:generator>LibreOffice/6.0.7.3$Linux_X86_64 LibreOffice_project/00m0$Build-3</meta:generator>
    <meta:document-statistic meta:table-count="0" meta:image-count="0" meta:object-count="0" meta:page-count="2" meta:paragraph-count="27" meta:word-count="233" meta:character-count="1508" meta:non-whitespace-character-count="1196"/>
  </office:meta>
</office:document-meta>
</file>